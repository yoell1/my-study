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맑은 고딕'" style:font-family-asian="'맑은 고딕'" style:font-family-complex="'맑은 고딕'" fo:background-color="transparent" style:use-window-font-color="true"/>
    </style:style>
    <style:style style:name="T2" style:family="text">
      <style:text-properties fo:font-size="14.00pt" fo:font-weight="normal" fo:font-family="'맑은 고딕'" style:font-family-asian="'맑은 고딕'" style:font-family-complex="'맑은 고딕'" fo:background-color="transparent" style:use-window-font-color="true"/>
    </style:style>
    <style:style style:name="T3" style:family="text">
      <style:text-properties fo:font-size="14.00pt" fo:font-weight="normal" fo:font-family="'맑은 고딕'" style:font-family-asian="'맑은 고딕'" style:font-family-complex="'맑은 고딕'" fo:background-color="transparent" style:use-window-font-color="true"/>
    </style:style>
    <style:style style:name="T4" style:family="text">
      <style:text-properties fo:font-size="14.00pt" fo:font-weight="normal" fo:font-family="'맑은 고딕'" style:font-family-asian="'맑은 고딕'" style:font-family-complex="'맑은 고딕'" fo:background-color="transparent" style:use-window-font-color="true"/>
    </style:style>
    <style:style style:name="T5" style:family="text">
      <style:text-properties fo:font-size="14.00pt" fo:font-weight="normal" fo:font-family="'맑은 고딕'" style:font-family-asian="'맑은 고딕'" style:font-family-complex="'맑은 고딕'" fo:background-color="transparent" style:use-window-font-color="true"/>
    </style:style>
    <style:style style:name="T6" style:family="text">
      <style:text-properties fo:font-size="14.00pt" fo:font-weight="normal" fo:font-family="'맑은 고딕'" style:font-family-asian="'맑은 고딕'" style:font-family-complex="'맑은 고딕'" fo:background-color="transparent" style:use-window-font-color="true"/>
    </style:style>
    <style:style style:name="T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5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5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5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5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5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5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5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5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5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5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6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6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6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6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6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6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6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6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6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6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7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7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7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7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7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7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7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7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7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7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9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0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1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3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4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5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7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8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9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1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2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3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6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7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8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0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1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1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1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13" style:family="text">
      <style:text-properties fo:font-size="14.00pt" fo:font-weight="normal" fo:font-family="'맑은 고딕'" style:font-family-asian="'맑은 고딕'" style:font-family-complex="'맑은 고딕'" fo:background-color="transparent" style:use-window-font-color="true"/>
    </style:style>
    <style:style style:name="T31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1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1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1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1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1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2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6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7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80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8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8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8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8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관계형 데이터베이스</text:span><text:span text:style-name="T2">(RDB)</text:span><text:span text:style-name="T3">와<text:s/></text:span><text:span text:style-name="T4">NoSQL<text:s/></text:span><text:span text:style-name="T5">의 개념 및 차이점<text:s/></text:span><text:span text:style-name="T6"/></text:p>
      <text:p text:style-name="P1"><text:span text:style-name="T7">1</text:span><text:span text:style-name="T8">.<text:s/></text:span><text:span text:style-name="T9">데이터 구조와 스키마</text:span><text:span text:style-name="T10">(Schema)</text:span><text:span text:style-name="T11"/></text:p>
      <text:p text:style-name="P1"><text:span text:style-name="T12">RDB :<text:s/></text:span><text:span text:style-name="T13">사전 정의된 엄격한 스키마가 필요하다</text:span><text:span text:style-name="T14">.<text:s/></text:span><text:span text:style-name="T15">테이블의 구조를 변경하기 어렵지만</text:span><text:span text:style-name="T16">,<text:s/></text:span><text:span text:style-name="T17">데이터의 무결성과 일관성이 완벽하게 보장된다</text:span><text:span text:style-name="T18">.</text:span><text:span text:style-name="T19"/></text:p>
      <text:p text:style-name="P1"><text:span text:style-name="T20">NoSQL :<text:s/></text:span><text:span text:style-name="T21">스키마가 유동적이며 동적이다</text:span><text:span text:style-name="T22">.<text:s/></text:span><text:span text:style-name="T23">데이터 입력 시점에 필드를 추가하거나 삭제하는 등 구조변경이 자유롭다</text:span><text:span text:style-name="T24">.</text:span><text:span text:style-name="T25"/></text:p>
      <text:p text:style-name="P1"><text:span text:style-name="T25"/></text:p>
      <text:p text:style-name="P1"><text:span text:style-name="T26">2</text:span><text:span text:style-name="T27">.<text:s/></text:span><text:span text:style-name="T28">관계와 쿼리</text:span><text:span text:style-name="T29"/></text:p>
      <text:p text:style-name="P1"><text:span text:style-name="T30">RDB :<text:s/></text:span><text:span text:style-name="T31">테이블간의 관계</text:span><text:span text:style-name="T32">(Foreige Key<text:s/></text:span><text:span text:style-name="T33">등</text:span><text:span text:style-name="T34">)</text:span><text:span text:style-name="T35">를 맺을 수 있어 복잡한 데이터 조회가 가능하다</text:span><text:span text:style-name="T36">.<text:s/></text:span><text:span text:style-name="T37">데이터를 조작할 때 구조화된 쿼리 언어</text:span><text:span text:style-name="T38">(SQL)</text:span><text:span text:style-name="T39">을 사용한다</text:span><text:span text:style-name="T40">.</text:span><text:span text:style-name="T41"/></text:p>
      <text:p text:style-name="P1"><text:span text:style-name="T42">NoSQL :<text:s/></text:span><text:span text:style-name="T43">테이블 간의 관계를 정의하지 않으므로<text:s/></text:span><text:span text:style-name="T44">join<text:s/></text:span><text:span text:style-name="T45">연산을 지원하지 않는다</text:span><text:span text:style-name="T46">.<text:s/></text:span><text:span text:style-name="T47">필요한 데이터가 한 곳에 모여 있도록</text:span><text:span text:style-name="T48">(</text:span><text:span text:style-name="T49">역정규화</text:span><text:span text:style-name="T50">)</text:span><text:span text:style-name="T51">설계하여 빠른 조회를 유도한다</text:span><text:span text:style-name="T52">.</text:span><text:span text:style-name="T53"/></text:p>
      <text:p text:style-name="P1"><text:span text:style-name="T53"/></text:p>
      <text:p text:style-name="P1"><text:span text:style-name="T54">3</text:span><text:span text:style-name="T55">.<text:s/></text:span><text:span text:style-name="T56">확장방식</text:span><text:span text:style-name="T57">(Scalability)</text:span><text:span text:style-name="T58"/></text:p>
      <text:p text:style-name="P1"><text:span text:style-name="T59">RDB :<text:s/></text:span><text:span text:style-name="T60">주로 수직적 확장</text:span><text:span text:style-name="T61">(Scale-up,</text:span><text:span text:style-name="T62">서버의 하드웨어 성능을 높이는 방식</text:span><text:span text:style-name="T63">)</text:span><text:span text:style-name="T64">을 사용한다</text:span><text:span text:style-name="T65">.<text:s/></text:span><text:span text:style-name="T66">성능 한계에 도달하면 비용이 기하급수적으로 증가할 수 있다</text:span><text:span text:style-name="T67">.</text:span><text:span text:style-name="T68"/></text:p>
      <text:p text:style-name="P1"><text:span text:style-name="T69">NoSQL :<text:s/></text:span><text:span text:style-name="T70">주로 수평적확장</text:span><text:span text:style-name="T71">(Scale-out,</text:span><text:span text:style-name="T72">서버의 대수를 늘려 데이터를 분산 저장</text:span><text:span text:style-name="T73">)</text:span><text:span text:style-name="T74">을 사용하여 빅데이터 처리에 용이하고 비용이 효율적이다</text:span><text:span text:style-name="T75">.</text:span><text:span text:style-name="T76"/></text:p>
      <text:p text:style-name="P1"><text:span text:style-name="T76"/></text:p>
      <text:p text:style-name="P1"><text:span text:style-name="T77">4</text:span><text:span text:style-name="T78">.<text:s/></text:span><text:span text:style-name="T79">주요 사용 사례 및 대표 시스템</text:span><text:span text:style-name="T80"/></text:p>
      <text:p text:style-name="P1"><text:span text:style-name="T81">RDB :<text:s/></text:span><text:span text:style-name="T82">금융 거래<text:s/></text:span><text:span text:style-name="T83">,<text:s/></text:span><text:span text:style-name="T84">주문 관리<text:s/></text:span><text:span text:style-name="T85">, ERP<text:s/></text:span><text:span text:style-name="T86">등 데이터의 정확성과 무결성이 중요한 시스템</text:span><text:span text:style-name="T87"/></text:p>
      <text:p text:style-name="P1"><text:span text:style-name="T88">NoSQL :<text:s/></text:span><text:span text:style-name="T89">실시간 스트리밍</text:span><text:span text:style-name="T90">,<text:s/></text:span><text:span text:style-name="T91">대용량 로그 분석</text:span><text:span text:style-name="T92">, SNS<text:s/></text:span><text:span text:style-name="T93">메시징</text:span><text:span text:style-name="T94">,<text:s/></text:span><text:span text:style-name="T95">카탈로그 데이터등</text:span><text:span text:style-name="T96"/></text:p>
      <text:p text:style-name="P1"><text:span text:style-name="T97">읽기 처리가 매우 많고 유연한 확장이 필요한 시스템</text:span><text:span text:style-name="T98"/></text:p>
      <text:p text:style-name="P1"><draw:frame text:anchor-type="as-char" svg:width="183.09mm" svg:height="133.88mm" style:rel-width="scale" style:rel-height="scale"><draw:object-ole xlink:href="OleObj1"/><draw:image xlink:href="ObjectReplacements/OleObj1"/></draw:frame><text:span text:style-name="T100"/></text:p>
      <text:p text:style-name="P1"><text:span text:style-name="T100"/></text:p>
      <text:p text:style-name="P1"><text:span text:style-name="T101">상세 비교 분석</text:span><text:span text:style-name="T102"/></text:p>
      <text:p text:style-name="P1"><text:span text:style-name="T103">1</text:span><text:span text:style-name="T104">.<text:s/></text:span><text:span text:style-name="T105">스키마와 데이터 무결성</text:span><text:span text:style-name="T106"/></text:p>
      <text:p text:style-name="P1"><text:span text:style-name="T107">RDB (</text:span><text:span text:style-name="T108">엄격한 데이터 관리</text:span><text:span text:style-name="T109">):<text:s/></text:span><text:span text:style-name="T110">데이터를 저장하기 전에 반드시 테이블 구조</text:span><text:span text:style-name="T111">(</text:span><text:span text:style-name="T112">데이터 타입</text:span><text:span text:style-name="T113">,<text:s/></text:span><text:span text:style-name="T114">글자 수 제한 등</text:span><text:span text:style-name="T115">)</text:span><text:span text:style-name="T116">를 정의해야 한다</text:span><text:span text:style-name="T117">.<text:s/></text:span><text:span text:style-name="T118">잘못된 형식의 데이터가 들어오는 것을 원천 차단하므로 데이터의 높은 품질과 무결성을 유지한다</text:span><text:span text:style-name="T119">.</text:span><text:span text:style-name="T120"/></text:p>
      <text:p text:style-name="P1"><text:span text:style-name="T121">NoSQL (</text:span><text:span text:style-name="T122">자유로운 데이터 관리</text:span><text:span text:style-name="T123">):<text:s/></text:span><text:span text:style-name="T124">정해진 틀이 없다</text:span><text:span text:style-name="T125">.<text:s/></text:span><text:span text:style-name="T126">예를 들어 같은 회원 데이터라도<text:s/></text:span><text:span text:style-name="T127">1</text:span><text:span text:style-name="T128">번 회원은<text:s/></text:span><text:span text:style-name="T129">'</text:span><text:span text:style-name="T130">이름</text:span><text:span text:style-name="T131">,<text:s/></text:span><text:span text:style-name="T132">나이</text:span><text:span text:style-name="T133">'</text:span><text:span text:style-name="T134">만 저장하고</text:span><text:span text:style-name="T135">,<text:s/></text:span><text:span text:style-name="T136">2</text:span><text:span text:style-name="T137">번 회원은<text:s/></text:span><text:span text:style-name="T138">'</text:span><text:span text:style-name="T139">이름</text:span><text:span text:style-name="T140">,<text:s/></text:span><text:span text:style-name="T141">주소</text:span><text:span text:style-name="T142">,<text:s/></text:span><text:span text:style-name="T143">취미</text:span><text:span text:style-name="T144">'</text:span><text:span text:style-name="T145">를 동시에 저장할 수 있어 비정형 데이터 처리에 유리하다</text:span><text:span text:style-name="T146">.</text:span><text:span text:style-name="T147"/></text:p>
      <text:p text:style-name="P1"><text:span text:style-name="T148">2</text:span><text:span text:style-name="T149">.<text:s/></text:span><text:span text:style-name="T150">확장성<text:s/></text:span><text:span text:style-name="T151">(Scalability)RDB (</text:span><text:span text:style-name="T152">서버 업그레이드</text:span><text:span text:style-name="T153">):<text:s/></text:span><text:span text:style-name="T154">하나의 서버 성능을 고성능<text:s/></text:span><text:span text:style-name="T155">CPU</text:span><text:span text:style-name="T156">나 대용량 메모리로 교체하는 방식</text:span><text:span text:style-name="T157">(Scale-up)</text:span><text:span text:style-name="T158">을 주로 사용</text:span><text:span text:style-name="T159">.<text:s/></text:span><text:span text:style-name="T160">여러 대의 서버로 분산</text:span><text:span text:style-name="T161">(</text:span><text:span text:style-name="T162">샤딩</text:span><text:span text:style-name="T163">)</text:span><text:span text:style-name="T164">하는 것이 기술적으로 복잡하고 까다롭다</text:span><text:span text:style-name="T165">.</text:span><text:span text:style-name="T166"/></text:p>
      <text:p text:style-name="P1"><text:span text:style-name="T167">NoSQL (</text:span><text:span text:style-name="T168">서버 증설</text:span><text:span text:style-name="T169">):<text:s/></text:span><text:span text:style-name="T170">값싼 서버를 여러 대 이어 붙여서 데이터를 쪼개어 저장하는 방식</text:span><text:span text:style-name="T171">(Scale-out)</text:span><text:span text:style-name="T172">을 기본으로 설계되었다</text:span><text:span text:style-name="T173">.<text:s/></text:span><text:span text:style-name="T174">웹 서비스의 트래픽이 급증할 때 서버를 늘리기만 하면 되므로 클라우드 환경에 최적화되어 있다</text:span><text:span text:style-name="T175">.</text:span><text:span text:style-name="T176"/></text:p>
      <text:p text:style-name="P1"><text:span text:style-name="T177">3</text:span><text:span text:style-name="T178">.<text:s/></text:span><text:span text:style-name="T179">트랜잭션과 일관성<text:s/></text:span><text:span text:style-name="T180">(ACID vs BASE)RDB (ACID<text:s/></text:span><text:span text:style-name="T181">원칙</text:span><text:span text:style-name="T182">):<text:s/></text:span><text:span text:style-name="T183">은행 송금처럼 한쪽에서 돈이 빠져나가면 다른 쪽에 반드시 입금되어야 하는 연산을 완벽히 보장한다</text:span><text:span text:style-name="T184">.<text:s/></text:span><text:span text:style-name="T185">중간에 오류가 나면 전체를 취소</text:span><text:span text:style-name="T186">(Rollback)</text:span><text:span text:style-name="T187">하여 데이터가 꼬이는 것을 막는다</text:span><text:span text:style-name="T188">.</text:span><text:span text:style-name="T189"/></text:p>
      <text:p text:style-name="P1"><text:span text:style-name="T190">NoSQL (BASE<text:s/></text:span><text:span text:style-name="T191">원칙</text:span><text:span text:style-name="T192">):<text:s/></text:span><text:span text:style-name="T193">분산된 서버 간에 일시적으로 데이터가 다를 수 있음을 허용한다</text:span><text:span text:style-name="T194">.<text:s/></text:span><text:span text:style-name="T195">대신 시스템이 절대 다운되지 않고</text:span><text:span text:style-name="T196">(</text:span><text:span text:style-name="T197">가용성</text:span><text:span text:style-name="T198">)<text:s/></text:span><text:span text:style-name="T199">실시간으로 빠르게 응답하는 것을 목표로 하며</text:span><text:span text:style-name="T200">,<text:s/></text:span><text:span text:style-name="T201">결국 시간이 지나면 모든 서버의 데이터가 일치</text:span><text:span text:style-name="T202">(</text:span><text:span text:style-name="T203">궁극적 일관성</text:span><text:span text:style-name="T204">)</text:span><text:span text:style-name="T205">한다</text:span><text:span text:style-name="T206">.</text:span><text:span text:style-name="T207"/></text:p>
      <text:p text:style-name="P1"><text:span text:style-name="T207"/></text:p>
      <text:p text:style-name="P1"><text:span text:style-name="T208">RDB</text:span><text:span text:style-name="T209">의 핵심 특징</text:span><text:span text:style-name="T210">: ACID<text:s/></text:span><text:span text:style-name="T211">트랜잭션</text:span><text:span text:style-name="T212"/></text:p>
      <text:p text:style-name="P1"><text:span text:style-name="T213">RDB</text:span><text:span text:style-name="T214">는 데이터의 결함이 없음을 증명하기 위해<text:s/></text:span><text:span text:style-name="T215">ACID</text:span><text:span text:style-name="T216">라는 강력한 규칙을 따따른다</text:span><text:span text:style-name="T217">.</text:span><text:span text:style-name="T218"/></text:p>
      <text:p text:style-name="P1"><text:span text:style-name="T219">Atomicity (</text:span><text:span text:style-name="T220">원자성</text:span><text:span text:style-name="T221">):<text:s/></text:span><text:span text:style-name="T222">트랜잭션</text:span><text:span text:style-name="T223">(</text:span><text:span text:style-name="T224">작업 단위</text:span><text:span text:style-name="T225">)<text:s/></text:span><text:span text:style-name="T226">내의 모든 명령은<text:s/></text:span><text:span text:style-name="T227">100</text:span><text:span text:style-name="T228">%<text:s/></text:span><text:span text:style-name="T229">성공하거나</text:span><text:span text:style-name="T230">,<text:s/></text:span><text:span text:style-name="T231">100</text:span><text:span text:style-name="T232">%<text:s/></text:span><text:span text:style-name="T233">실패</text:span><text:span text:style-name="T234">(</text:span><text:span text:style-name="T235">취소</text:span><text:span text:style-name="T236">)</text:span><text:span text:style-name="T237">해야 한다</text:span><text:span text:style-name="T238">. (</text:span><text:span text:style-name="T239">예</text:span><text:span text:style-name="T240">:<text:s/></text:span><text:span text:style-name="T241">계좌이체 중 에러가 나면 송금 전 상태로 롤백</text:span><text:span text:style-name="T242">)</text:span><text:span text:style-name="T243"/></text:p>
      <text:p text:style-name="P1"><text:span text:style-name="T244">Consistency (</text:span><text:span text:style-name="T245">일관성</text:span><text:span text:style-name="T246">):<text:s/></text:span><text:span text:style-name="T247">데이터베이스의 제약 조건</text:span><text:span text:style-name="T248">(</text:span><text:span text:style-name="T249">예</text:span><text:span text:style-name="T250">:<text:s/></text:span><text:span text:style-name="T251">나이 컬럼에는 음수가 들어올 수 없음</text:span><text:span text:style-name="T252">)</text:span><text:span text:style-name="T253">을 언제나 만족해야 한다</text:span><text:span text:style-name="T254">.</text:span><text:span text:style-name="T255"/></text:p>
      <text:p text:style-name="P1"><text:span text:style-name="T256">Isolation (</text:span><text:span text:style-name="T257">격리성</text:span><text:span text:style-name="T258">):<text:s/></text:span><text:span text:style-name="T259">두 개 이상의 트랜잭션이 동시에 실행될 때</text:span><text:span text:style-name="T260">,<text:s/></text:span><text:span text:style-name="T261">서로의 연산에 끼어들 수 없다</text:span><text:span text:style-name="T262">.</text:span><text:span text:style-name="T263"/></text:p>
      <text:p text:style-name="P1"><text:span text:style-name="T264">Durability (</text:span><text:span text:style-name="T265">지속성</text:span><text:span text:style-name="T266">):<text:s/></text:span><text:span text:style-name="T267">성공적으로 완료된 트랜잭션의 결과는 시스템이 고장 나더라도 영구적으로 보존된다</text:span><text:span text:style-name="T268">.</text:span><text:span text:style-name="T269"/></text:p>
      <text:p text:style-name="P1"><text:span text:style-name="T269"/></text:p>
      <text:p text:style-name="P1"><text:span text:style-name="T270">NoSQL</text:span><text:span text:style-name="T271">의 핵심 특징</text:span><text:span text:style-name="T272">: BASE</text:span><text:span text:style-name="T273">와<text:s/></text:span><text:span text:style-name="T274">CAP<text:s/></text:span><text:span text:style-name="T275">이론</text:span><text:span text:style-name="T276"/></text:p>
      <text:p text:style-name="P1"><text:span text:style-name="T277">NoSQL</text:span><text:span text:style-name="T278">은 완벽한 정확성보다는 멈추지 않는 서비스</text:span><text:span text:style-name="T279">(</text:span><text:span text:style-name="T280">가용성</text:span><text:span text:style-name="T281">)</text:span><text:span text:style-name="T282">와 대용량 처리를 위해<text:s/></text:span><text:span text:style-name="T283">BASE<text:s/></text:span><text:span text:style-name="T284">원칙을 따른다</text:span><text:span text:style-name="T285">.</text:span><text:span text:style-name="T286"/></text:p>
      <text:p text:style-name="P1"><text:span text:style-name="T287">Basically Available (</text:span><text:span text:style-name="T288">기본적 가용성</text:span><text:span text:style-name="T289">):<text:s/></text:span><text:span text:style-name="T290">일부 서버가 다운되더라도 전체 시스템은 어떻게든 작동해야 한다</text:span><text:span text:style-name="T291">.</text:span><text:span text:style-name="T292"/></text:p>
      <text:p text:style-name="P1"><text:span text:style-name="T293">Soft State (</text:span><text:span text:style-name="T294">소프트 상태</text:span><text:span text:style-name="T295">):<text:s/></text:span><text:span text:style-name="T296">외부의 개입이 없어도 데이터 상태가 가변적일 수 있다</text:span><text:span text:style-name="T297">. (</text:span><text:span text:style-name="T298">서버 간 데이터 복사 시간 필요</text:span><text:span text:style-name="T299">)</text:span><text:span text:style-name="T300"/></text:p>
      <text:p text:style-name="P1"><text:span text:style-name="T301">Eventual Consistency (</text:span><text:span text:style-name="T302">궁극적 일관성</text:span><text:span text:style-name="T303">):<text:s/></text:span><text:span text:style-name="T304">당장 실시간으로는 여러 서버의 데이터가 다를 수 있지만</text:span><text:span text:style-name="T305">,<text:s/></text:span><text:span text:style-name="T306">시간이 지나면 결국 동일하게 일치하여짐</text:span><text:span text:style-name="T307">. (</text:span><text:span text:style-name="T308">예</text:span><text:span text:style-name="T309">:<text:s/></text:span><text:span text:style-name="T310">인스타그램 좋아요 수가 새로고침할 때마다 조금씩 다르게 보이다가 결국 맞춰지는 현상</text:span><text:span text:style-name="T311">)</text:span><text:span text:style-name="T312"/></text:p>
      <text:p text:style-name="P1"><text:span text:style-name="T313"/></text:p>
      <text:p text:style-name="P1"><text:span text:style-name="T314">3</text:span><text:span text:style-name="T315">. RDB vs NoSQL<text:s/></text:span><text:span text:style-name="T316">장단점<text:s text:c="2"/>파악하기</text:span><text:span text:style-name="T317"><text:s/></text:span><text:span text:style-name="T318"/></text:p>
      <text:p text:style-name="P1"><text:span text:style-name="T319">RDB</text:span><text:span text:style-name="T320">의 장단점장점</text:span><text:span text:style-name="T321">:</text:span><text:span text:style-name="T322">데이터 중복이 없어 저장 공간이 절약되고</text:span><text:span text:style-name="T323">,<text:s/></text:span><text:span text:style-name="T324">데이터 수정이 매우 쉽다</text:span><text:span text:style-name="T325">. (</text:span><text:span text:style-name="T326">회원 이름이 바뀌면 회원 테이블만 고치면 끝</text:span><text:span text:style-name="T327">)</text:span><text:span text:style-name="T328"/></text:p>
      <text:p text:style-name="P1"><text:span text:style-name="T329">SQL</text:span><text:span text:style-name="T330">이라는 전 세계 표준 언어를 사용하여 복잡한 통계</text:span><text:span text:style-name="T331">,<text:s/></text:span><text:span text:style-name="T332">조건 검색 데이터를 뽑아내기 쉽다</text:span><text:span text:style-name="T333">.</text:span><text:span text:style-name="T334"/></text:p>
      <text:p text:style-name="P1"><text:span text:style-name="T335">단점</text:span><text:span text:style-name="T336">:</text:span><text:span text:style-name="T337">데이터 양이 기하급수적으로 늘어나면 테이블 간의<text:s/></text:span><text:span text:style-name="T338">JOIN<text:s/></text:span><text:span text:style-name="T339">연산이 컴퓨터 메모리를 엄청나게 잡아먹어 시스템이 느려</text:span><text:span text:style-name="T340">진다</text:span><text:span text:style-name="T341">.</text:span><text:span text:style-name="T342"/></text:p>
      <text:p text:style-name="P1"><text:span text:style-name="T343">서버를 여러 대 늘려서 분산 처리하기가 구조적으로 매우 어렵</text:span><text:span text:style-name="T344">다</text:span><text:span text:style-name="T345">.</text:span><text:span text:style-name="T346"><text:s/></text:span><text:span text:style-name="T347"/></text:p>
      <text:p text:style-name="P1"><text:span text:style-name="T348">NoSQL</text:span><text:span text:style-name="T349">의 장단점</text:span><text:span text:style-name="T350"/></text:p>
      <text:p text:style-name="P1"><text:span text:style-name="T351">장점</text:span><text:span text:style-name="T352">:</text:span><text:span text:style-name="T353">데이터 구조</text:span><text:span text:style-name="T354">(</text:span><text:span text:style-name="T355">필드</text:span><text:span text:style-name="T356">)</text:span><text:span text:style-name="T357">를 언제든 마음대로 바꿀 수 있어 트렌드가 빨리 바뀌는 스타트업 서비스에 유리</text:span><text:span text:style-name="T358">함</text:span><text:span text:style-name="T359">.</text:span><text:span text:style-name="T360"/></text:p>
      <text:p text:style-name="P1"><text:span text:style-name="T361">서버를<text:s/></text:span><text:span text:style-name="T362">10</text:span><text:span text:style-name="T363">대</text:span><text:span text:style-name="T364">,<text:s/></text:span><text:span text:style-name="T365">100</text:span><text:span text:style-name="T366">대로 늘리는 수평적 확장</text:span><text:span text:style-name="T367">(Scale-out)</text:span><text:span text:style-name="T368">이 매우 쉬워 구글</text:span><text:span text:style-name="T369">,<text:s/></text:span><text:span text:style-name="T370">페이스북 수준의 초대용량 데이터를 다룰 수 있습니다</text:span><text:span text:style-name="T371">.</text:span><text:span text:style-name="T372"/></text:p>
      <text:p text:style-name="P1"><text:span text:style-name="T373">단점</text:span><text:span text:style-name="T374">:</text:span><text:span text:style-name="T375">데이터가 여러 곳에 중복 저장되어 있으므로</text:span><text:span text:style-name="T376">,<text:s/></text:span><text:span text:style-name="T377">데이터 수정 시 모든 문서를 찾아서 다 고쳐야<text:s/></text:span><text:span text:style-name="T378">함</text:span><text:span text:style-name="T379">. (</text:span><text:span text:style-name="T380">수정 작업이 느리고 무거움</text:span><text:span text:style-name="T381">)</text:span><text:span text:style-name="T382">중복 데이터 관리를 잘못하면 특정 문서에는 수정 반영이 안 되어 데이터가 꼬일 수 있다</text:span><text:span text:style-name="T383">.</text:span><text:span text:style-name="T3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